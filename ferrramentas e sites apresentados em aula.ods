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8.698cm"/>
    </style:style>
    <style:style style:name="co4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fd320"/>
    </style:style>
    <style:style style:name="T1" style:family="text">
      <style:text-properties fo:font-size="10pt" fo:font-weight="bold" style:font-size-asian="10pt" style:font-size-complex="10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Java Scrip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ulo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la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algoritimos para aprender padrões e trazer resultado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iblioteca java script</text:p>
          </table:table-cell>
          <table:table-cell office:value-type="string" calcext:value-type="string">
            <text:p>tensorflow.js</text:p>
          </table:table-cell>
          <table:table-cell table:style-name="ce2" office:value-type="string" calcext:value-type="string">
            <text:p>www.tensorflow.org/js/demos </text:p>
          </table:table-cell>
          <table:table-cell table:style-name="ce2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ormalização todas as vezes que usar machine learning para trabalhar entre 0 e 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penas uma das opções “one hot take”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EP LEARNING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TIFICIAL INTELLIGENCE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" table:number-columns-repeated="5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Aula2</text:p>
          </table:table-cell>
          <table:table-cell table:style-name="ce1" office:value-type="string" calcext:value-type="string">
            <text:p><text:span text:style-name="T1">TEACHABLE MACHINE</text:span></text:p>
            <text:p/>
          </table:table-cell>
          <table:table-cell table:style-name="ce1" office:value-type="string" calcext:value-type="string">
            <text:p><text:a xlink:href="http://www.teacheblemachine.withgoogle.com/" xlink:type="simple">www.teacheblemachine.withgoogle.com</text:a>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kaggl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ula3</text:p>
          </table:table-cell>
          <table:table-cell table:style-name="ce1" office:value-type="string" calcext:value-type="string">
            <text:p>Rede Neural</text:p>
          </table:table-cell>
          <table:table-cell table:style-name="ce1" table:number-columns-repeated="3"/>
          <table:table-cell table:number-columns-repeated="2"/>
        </table:table-row>
      </table:table>
      <table:table table:name="Meu GitHub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it hub do cur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unipds-engenharia-de-ia-aplicada" xlink:type="simple">https://github.com/unipds-engenharia-de-ia-aplicada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20:23:18.944003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21:48:01.453491600</meta:creation-date>
    <dc:date>2026-06-03T21:40:05.900570800</dc:date>
    <meta:editing-duration>PT1H9M11S</meta:editing-duration>
    <meta:editing-cycles>3</meta:editing-cycles>
    <meta:generator>LibreOffice/25.8.6.2$Windows_X86_64 LibreOffice_project/b4b39682cd9868fa725bc664aff94278d315bd04</meta:generator>
    <meta:document-statistic meta:table-count="2" meta:cell-count="20" meta:object-count="0"/>
  </office:meta>
</office:document-meta>
</file>